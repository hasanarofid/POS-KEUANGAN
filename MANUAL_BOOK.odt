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manual-book-sistem-manajemen-keuangan-operasional-lux-indonesia"/>Manual Book: Sistem Manajemen Keuangan &amp; Operasional (Lux Indonesia)<text:bookmark-end text:name="manual-book-sistem-manajemen-keuangan-operasional-lux-indonesia"/></text:h>
      <text:p text:style-name="First_20_paragraph">Dokumentasi ini disusun sebagai panduan penggunaan dan materi presentasi untuk penawaran sistem manajemen keuangan terintegrasi.</text:p>
      <text:p text:style-name="Horizontal_20_Line"/>
      <text:h text:style-name="Heading_20_2" text:outline-level="2"><text:bookmark-start text:name="pendahuluan"/>1. Pendahuluan<text:bookmark-end text:name="pendahuluan"/></text:h>
      <text:p text:style-name="First_20_paragraph">Sistem ini adalah solusi Enterprise Resource Planning (ERP) berbasis web yang dirancang khusus untuk mempermudah pencatatan transaksi, pengelolaan stok, dan pelaporan keuangan secara real-time. Dibangun dengan teknologi modern (Laravel &amp; Filament), sistem ini menawarkan antarmuka yang intuitif, cepat, dan aman.</text:p>
      <text:h text:style-name="Heading_20_2" text:outline-level="2"><text:bookmark-start text:name="fitur-utama"/>2. Fitur Utama<text:bookmark-end text:name="fitur-utama"/></text:h>
      <text:p text:style-name="First_20_paragraph">Sistem terbagi menjadi beberapa modul utama: - <text:span text:style-name="T1">Manajemen Penjualan</text:span>: Pencatatan invoice, pengelolaan diskon, dan perhitungan PPN otomatis. - <text:span text:style-name="T1">Manajemen Pembelian</text:span>: Tracking stok masuk dari supplier dan biaya pengadaan. - <text:span text:style-name="T1">Inventori &amp; Stok</text:span>: Monitoring stok real-time, mutasi barang, dan laporan opname. - <text:span text:style-name="T1">Pengeluaran (Expenses)</text:span>: Pencatatan biaya operasional kantor dan lainnya. - <text:span text:style-name="T1">Surat Jalan (Delivery Notes)</text:span>: Pembuatan dokumen pengiriman otomatis yang terintegrasi dengan data penjualan. - <text:span text:style-name="T1">Laporan Komprehensif</text:span>: Laporan penjualan, pembelian, stok, dan biaya dalam format yang mudah dibaca dan dapat diekspor.</text:p>
      <text:p text:style-name="Horizontal_20_Line"/>
      <text:h text:style-name="Heading_20_2" text:outline-level="2"><text:bookmark-start text:name="panduan-penggunaan-modul"/>3. Panduan Penggunaan Modul<text:bookmark-end text:name="panduan-penggunaan-modul"/></text:h>
      <text:h text:style-name="Heading_20_3" text:outline-level="3"><text:bookmark-start text:name="dashboard"/>3.1 Dashboard<text:bookmark-end text:name="dashboard"/></text:h>
      <text:p text:style-name="First_20_paragraph">Halaman utama yang memberikan ringkasan visual mengenai performa bisnis, termasuk total penjualan bulanan, pengeluaran, dan status stok kritis.</text:p>
      <text:h text:style-name="Heading_20_3" text:outline-level="3"><text:bookmark-start text:name="master-data-produk-pelanggan"/>3.2 Master Data (Produk &amp; Pelanggan)<text:bookmark-end text:name="master-data-produk-pelanggan"/></text:h>
      <text:list text:style-name="L1">
        <text:list-item>
          <text:p text:style-name="P1"><text:span text:style-name="T1">Produk</text:span>: Mengelola katalog barang, harga jual, harga beli, dan kategori produk. Mendukung pengaturan SKU dan kategori untuk pengelompokan yang rapi.</text:p>
        </text:list-item>
        <text:list-item>
          <text:p text:style-name="P1"><text:span text:style-name="T1">Pelanggan</text:span>: Database pelanggan lengkap dengan informasi penagihan dan pengiriman.</text:p>
        </text:list-item>
      </text:list>
      <text:h text:style-name="Heading_20_3" text:outline-level="3"><text:bookmark-start text:name="modul-penjualan-sales"/>3.3 Modul Penjualan (Sales)<text:bookmark-end text:name="modul-penjualan-sales"/></text:h>
      <text:list text:style-name="L2">
        <text:list-item>
          <text:p text:style-name="P2"><text:span text:style-name="T1">Buat Pesanan</text:span>: Masukkan data pelanggan, pilih produk, dan sistem akan menghitung subtotal secara otomatis.</text:p>
        </text:list-item>
        <text:list-item>
          <text:p text:style-name="P2"><text:span text:style-name="T1">PPN &amp; Diskon</text:span>: Mendukung pengaturan PPN (11%) dan diskon (persentase atau nominal) per item atau per transaksi. Sistem secara otomatis mendeteksi status PPN pelanggan saat dipilih.</text:p>
        </text:list-item>
        <text:list-item>
          <text:p text:style-name="P2"><text:span text:style-name="T1">Fleksibilitas Satuan</text:span>: Mendukung berbagai jenis satuan seperti PCS, DUS, SET, dan KG dengan konversi harga otomatis.</text:p>
        </text:list-item>
        <text:list-item>
          <text:p text:style-name="P2"><text:span text:style-name="T1">Cetak Invoice</text:span>: Fitur cetak nota profesional langsung dari daftar penjualan.</text:p>
        </text:list-item>
        <text:list-item>
          <text:p text:style-name="P2"><text:span text:style-name="T1">Tracking Umur Piutang</text:span>: Menampilkan kolom “Umur (hr)” invoice, memudahkan pemantauan lama tagihan belum dibayar sejak tanggal transaksi.</text:p>
        </text:list-item>
      </text:list>
      <text:h text:style-name="Heading_20_3" text:outline-level="3"><text:bookmark-start text:name="modul-stok-inventory"/>3.4 Modul Stok (Inventory)<text:bookmark-end text:name="modul-stok-inventory"/></text:h>
      <text:list text:style-name="L3">
        <text:list-item>
          <text:p text:style-name="P3"><text:span text:style-name="T1">Stok Masuk/Keluar</text:span>: Mencatat setiap perubahan stok dengan alasan yang jelas (Penjualan, Pembelian, atau Penyesuaian).</text:p>
        </text:list-item>
        <text:list-item>
          <text:p text:style-name="P3"><text:span text:style-name="T1">Update Stok Otomatis</text:span>: Stok akan berkurang otomatis saat terjadi penjualan dan bertambah saat pembelian dikonfirmasi.</text:p>
        </text:list-item>
      </text:list>
      <text:h text:style-name="Heading_20_3" text:outline-level="3"><text:bookmark-start text:name="modul-surat-jalan-delivery-notes"/>3.5 Modul Surat Jalan (Delivery Notes)<text:bookmark-end text:name="modul-surat-jalan-delivery-notes"/></text:h>
      <text:p text:style-name="First_20_paragraph">Tersedia tiga metode pembuatan Surat Jalan: 1. <text:span text:style-name="T1">Otomatis</text:span>: Berdasarkan data invoice yang sudah ada untuk efisiensi. 2. <text:span text:style-name="T1">Manual</text:span>: Input data pengiriman secara bebas untuk kebutuhan darurat. 3. <text:span text:style-name="T1">Custom</text:span>: Kombinasi data sistem dengan catatan tambahan khusus.</text:p>
      <text:h text:style-name="Heading_20_3" text:outline-level="3"><text:bookmark-start text:name="laporan-keuangan-reports"/>3.6 Laporan Keuangan (Reports)<text:bookmark-end text:name="laporan-keuangan-reports"/></text:h>
      <text:list text:style-name="L4">
        <text:list-item>
          <text:p text:style-name="P4"><text:span text:style-name="T1">Laporan Penjualan</text:span>: Filter berdasarkan rentang tanggal untuk melihat omzet dan profit.</text:p>
        </text:list-item>
        <text:list-item>
          <text:p text:style-name="P4"><text:span text:style-name="T1">Laporan Biaya</text:span>: Memantau pengeluaran operasional secara detail.</text:p>
        </text:list-item>
        <text:list-item>
          <text:p text:style-name="P4"><text:span text:style-name="T1">Laporan Stok</text:span>: Menampilkan nilai aset inventori saat ini.</text:p>
        </text:list-item>
      </text:list>
      <text:p text:style-name="Horizontal_20_Line"/>
      <text:h text:style-name="Heading_20_2" text:outline-level="2"><text:bookmark-start text:name="keamanan-hak-akses"/>4. Keamanan &amp; Hak Akses<text:bookmark-end text:name="keamanan-hak-akses"/></text:h>
      <text:p text:style-name="First_20_paragraph">Sistem dilengkapi dengan Role-Based Access Control (RBAC): - <text:span text:style-name="T1">Admin</text:span>: Akses penuh ke seluruh fitur dan pengaturan sistem. - <text:span text:style-name="T1">Kasir</text:span>: Terfokus pada pembuatan invoice dan transaksi harian. - <text:span text:style-name="T1">Gudang</text:span>: Mengelola stok dan surat jalan pengiriman.</text:p>
      <text:p text:style-name="Horizontal_20_Line"/>
      <text:h text:style-name="Heading_20_2" text:outline-level="2"><text:bookmark-start text:name="kontak-pengembang"/>5. Kontak Pengembang<text:bookmark-end text:name="kontak-pengembang"/></text:h>
      <text:p text:style-name="First_20_paragraph">Untuk informasi lebih lanjut mengenai implementasi, custom fitur, atau demo sistem, silakan hubungi:</text:p>
      <text:p text:style-name="Text_20_body"><text:span text:style-name="T1">Hasan Arofid</text:span> - <text:span text:style-name="T1">Website</text:span>: <text:a xlink:type="simple" xlink:href="https://hasanarofid.site" office:name=""><text:span text:style-name="Definition">hasanarofid.site</text:span></text:a> - <text:span text:style-name="T1">WhatsApp</text:span>: <text:a xlink:type="simple" xlink:href="http://Wa.me/628814959247" office:name=""><text:span text:style-name="Definition">0881-4959-247</text:span></text:a> - <text:span text:style-name="T1">Email</text:span>: hasan@amtechev.com</text:p>
      <text:p text:style-name="Horizontal_20_Line"/>
      <text:p text:style-name="First_20_paragraph"><text:span text:style-name="T2">© 2026 Lux Indonesia Management System. Developed by Hasan Arof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5-08T12:30:53Z</meta:creation-date>
    <dc:date>2026-05-08T12:30:53Z</dc:date>
  </office:meta>
</office:document-meta>
</file>